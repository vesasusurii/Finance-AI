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Column21" style:family="table-column">
      <style:table-column-properties style:column-width="1.7326in"/>
    </style:style>
    <style:style style:name="TableColumn22" style:family="table-column">
      <style:table-column-properties style:column-width="2.7562in"/>
    </style:style>
    <style:style style:name="TableColumn23" style:family="table-column">
      <style:table-column-properties style:column-width="2.0111in"/>
    </style:style>
    <style:style style:name="Table20" style:family="table">
      <style:table-properties style:width="6.5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TableColumn82" style:family="table-column">
      <style:table-column-properties style:column-width="2.5611in"/>
    </style:style>
    <style:style style:name="TableColumn83" style:family="table-column">
      <style:table-column-properties style:column-width="2.5902in"/>
    </style:style>
    <style:style style:name="Table81" style:family="table">
      <style:table-properties style:width="5.1513in" fo:margin-left="0in" table:align="left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" style:family="table-row">
      <style:table-row-properties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5" style:family="table-row">
      <style:table-row-properties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1" style:family="table-row">
      <style:table-row-properties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TableColumn108" style:family="table-column">
      <style:table-column-properties style:column-width="1.3208in"/>
    </style:style>
    <style:style style:name="TableColumn109" style:family="table-column">
      <style:table-column-properties style:column-width="2.0687in"/>
    </style:style>
    <style:style style:name="Table107" style:family="table">
      <style:table-properties style:width="3.3895in" fo:margin-left="0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fo:font-weight="bold" style:font-weight-asian="bold" style:font-weight-complex="bold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1" style:family="table-row">
      <style:table-row-properties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7" style:family="table-row">
      <style:table-row-properties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TableColumn133" style:family="table-column">
      <style:table-column-properties style:column-width="1.8972in"/>
    </style:style>
    <style:style style:name="TableColumn134" style:family="table-column">
      <style:table-column-properties style:column-width="1.9083in"/>
    </style:style>
    <style:style style:name="Table132" style:family="table">
      <style:table-properties style:width="3.8055in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3" style:family="table-row">
      <style:table-row-properties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6" style:family="table-row">
      <style:table-row-properties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9" style:family="table-row">
      <style:table-row-properties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5" style:family="table-row">
      <style:table-row-properties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8" style:family="table-row">
      <style:table-row-properties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1" style:family="table-row">
      <style:table-row-properties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4" style:family="table-row">
      <style:table-row-properties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7" style:family="table-row">
      <style:table-row-properties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3" style:family="table-row">
      <style:table-row-properties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text-properties fo:font-weight="bold" style:font-weight-asian="bold" style:font-weight-complex="bold"/>
    </style:style>
    <style:style style:name="P177" style:parent-style-name="Normal" style:family="paragraph">
      <style:text-properties fo:font-weight="bold" style:font-weight-asian="bold" style:font-weight-complex="bold"/>
    </style:style>
    <style:style style:name="P178" style:parent-style-name="Normal" style:family="paragraph">
      <style:text-properties fo:font-weight="bold" style:font-weight-asian="bold" style:font-weight-complex="bold"/>
    </style:style>
    <style:style style:name="P179" style:parent-style-name="Normal" style:family="paragraph">
      <style:text-properties fo:font-weight="bold" style:font-weight-asian="bold" style:font-weight-complex="bold"/>
    </style:style>
    <style:style style:name="P180" style:parent-style-name="Normal" style:family="paragraph">
      <style:text-properties fo:font-weight="bold" style:font-weight-asian="bold" style:font-weight-complex="bold"/>
    </style:style>
    <style:style style:name="P181" style:parent-style-name="Normal" style:family="paragraph">
      <style:text-properties fo:font-weight="bold" style:font-weight-asian="bold" style:font-weight-complex="bold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P183" style:parent-style-name="Normal" style:family="paragraph">
      <style:text-properties fo:font-weight="bold" style:font-weight-asian="bold" style:font-weight-complex="bold"/>
    </style:style>
    <style:style style:name="P184" style:parent-style-name="Normal" style:family="paragraph">
      <style:text-properties fo:font-weight="bold" style:font-weight-asian="bold" style:font-weight-complex="bold"/>
    </style:style>
    <style:style style:name="TableColumn186" style:family="table-column">
      <style:table-column-properties style:column-width="0.934in"/>
    </style:style>
    <style:style style:name="TableColumn187" style:family="table-column">
      <style:table-column-properties style:column-width="2.7395in"/>
    </style:style>
    <style:style style:name="Table185" style:family="table">
      <style:table-properties style:width="3.6736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TableRow193" style:family="table-row">
      <style:table-row-properties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9" style:family="table-row">
      <style:table-row-properties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2" style:parent-style-name="DefaultParagraphFont" style:family="text">
      <style:text-properties fo:font-weight="bold" style:font-weight-asian="bold" style:font-weight-complex="bold"/>
    </style:style>
    <style:style style:name="P203" style:parent-style-name="Normal" style:family="paragraph">
      <style:text-properties fo:font-weight="bold" style:font-weight-asian="bold" style:font-weight-complex="bold"/>
    </style:style>
    <style:style style:name="P204" style:parent-style-name="Normal" style:family="paragraph">
      <style:text-properties fo:font-weight="bold" style:font-weight-asian="bold" style:font-weight-complex="bold"/>
    </style:style>
    <style:style style:name="P205" style:parent-style-name="Normal" style:family="paragraph">
      <style:text-properties fo:font-weight="bold" style:font-weight-asian="bold" style:font-weight-complex="bold"/>
    </style:style>
    <style:style style:name="P206" style:parent-style-name="Normal" style:family="paragraph">
      <style:text-properties fo:font-weight="bold" style:font-weight-asian="bold" style:font-weight-complex="bold"/>
    </style:style>
    <style:style style:name="P207" style:parent-style-name="Normal" style:family="paragraph">
      <style:text-properties fo:font-weight="bold" style:font-weight-asian="bold" style:font-weight-complex="bold"/>
    </style:style>
    <style:style style:name="P208" style:parent-style-name="Normal" style:family="paragraph">
      <style:text-properties fo:font-weight="bold" style:font-weight-asian="bold" style:font-weight-complex="bold"/>
    </style:style>
    <style:style style:name="P209" style:parent-style-name="Normal" style:family="paragraph">
      <style:text-properties fo:font-weight="bold" style:font-weight-asian="bold" style:font-weight-complex="bold"/>
    </style:style>
    <style:style style:name="P210" style:parent-style-name="Normal" style:family="paragraph">
      <style:text-properties fo:font-weight="bold" style:font-weight-asian="bold" style:font-weight-complex="bold"/>
    </style:style>
    <style:style style:name="P211" style:parent-style-name="Normal" style:family="paragraph">
      <style:text-properties fo:font-weight="bold" style:font-weight-asian="bold" style:font-weight-complex="bold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P213" style:parent-style-name="Normal" style:family="paragraph">
      <style:text-properties fo:font-weight="bold" style:font-weight-asian="bold" style:font-weight-complex="bold"/>
    </style:style>
    <style:style style:name="P214" style:parent-style-name="Normal" style:family="paragraph">
      <style:text-properties fo:font-weight="bold" style:font-weight-asian="bold" style:font-weight-complex="bold"/>
    </style:style>
    <style:style style:name="P215" style:parent-style-name="Normal" style:family="paragraph">
      <style:text-properties fo:font-weight="bold" style:font-weight-asian="bold" style:font-weight-complex="bold"/>
    </style:style>
    <style:style style:name="P216" style:parent-style-name="Normal" style:family="paragraph">
      <style:text-properties fo:font-weight="bold" style:font-weight-asian="bold" style:font-weight-complex="bold"/>
    </style:style>
    <style:style style:name="P217" style:parent-style-name="Normal" style:family="paragraph">
      <style:text-properties fo:font-weight="bold" style:font-weight-asian="bold" style:font-weight-complex="bold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P219" style:parent-style-name="Normal" style:family="paragraph">
      <style:text-properties fo:font-weight="bold" style:font-weight-asian="bold" style:font-weight-complex="bold"/>
    </style:style>
    <style:style style:name="P220" style:parent-style-name="Normal" style:family="paragraph">
      <style:text-properties fo:font-weight="bold" style:font-weight-asian="bold" style:font-weight-complex="bold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P222" style:parent-style-name="Normal" style:family="paragraph">
      <style:text-properties fo:font-weight="bold" style:font-weight-asian="bold" style:font-weight-complex="bold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P224" style:parent-style-name="Normal" style:family="paragraph">
      <style:text-properties fo:font-weight="bold" style:font-weight-asian="bold" style:font-weight-complex="bold"/>
    </style:style>
    <style:style style:name="P225" style:parent-style-name="Normal" style:family="paragraph">
      <style:text-properties fo:font-weight="bold" style:font-weight-asian="bold" style:font-weight-complex="bold"/>
    </style:style>
    <style:style style:name="P226" style:parent-style-name="Normal" style:family="paragraph">
      <style:text-properties fo:font-weight="bold" style:font-weight-asian="bold" style:font-weight-complex="bold"/>
    </style:style>
    <style:style style:name="P227" style:parent-style-name="Normal" style:family="paragraph">
      <style:text-properties fo:font-weight="bold" style:font-weight-asian="bold" style:font-weight-complex="bold"/>
    </style:style>
    <style:style style:name="P228" style:parent-style-name="Normal" style:family="paragraph">
      <style:text-properties fo:font-weight="bold" style:font-weight-asian="bold" style:font-weight-complex="bold"/>
    </style:style>
    <style:style style:name="P229" style:parent-style-name="Normal" style:family="paragraph">
      <style:text-properties fo:font-weight="bold" style:font-weight-asian="bold" style:font-weight-complex="bold"/>
    </style:style>
    <style:style style:name="P230" style:parent-style-name="Normal" style:family="paragraph">
      <style:text-properties fo:font-weight="bold" style:font-weight-asian="bold" style:font-weight-complex="bold"/>
    </style:style>
    <style:style style:name="P231" style:parent-style-name="Normal" style:family="paragraph">
      <style:text-properties fo:font-weight="bold" style:font-weight-asian="bold" style:font-weight-complex="bold"/>
    </style:style>
    <style:style style:name="P232" style:parent-style-name="Normal" style:family="paragraph">
      <style:text-properties fo:font-weight="bold" style:font-weight-asian="bold" style:font-weight-complex="bold"/>
    </style:style>
    <style:style style:name="P233" style:parent-style-name="Normal" style:family="paragraph">
      <style:text-properties fo:font-weight="bold" style:font-weight-asian="bold" style:font-weight-complex="bold"/>
    </style:style>
    <style:style style:name="P234" style:parent-style-name="Normal" style:family="paragraph">
      <style:text-properties fo:font-weight="bold" style:font-weight-asian="bold" style:font-weight-complex="bold"/>
    </style:style>
    <style:style style:name="P235" style:parent-style-name="Normal" style:family="paragraph">
      <style:text-properties fo:font-weight="bold" style:font-weight-asian="bold" style:font-weight-complex="bold"/>
    </style:style>
    <style:style style:name="P236" style:parent-style-name="Normal" style:family="paragraph">
      <style:text-properties fo:font-weight="bold" style:font-weight-asian="bold" style:font-weight-complex="bold"/>
    </style:style>
    <style:style style:name="P237" style:parent-style-name="Normal" style:family="paragraph">
      <style:text-properties fo:font-weight="bold" style:font-weight-asian="bold" style:font-weight-complex="bold"/>
    </style:style>
    <style:style style:name="P238" style:parent-style-name="Normal" style:family="paragraph">
      <style:text-properties fo:font-weight="bold" style:font-weight-asian="bold" style:font-weight-complex="bold"/>
    </style:style>
    <style:style style:name="P239" style:parent-style-name="Normal" style:family="paragraph">
      <style:text-properties fo:font-weight="bold" style:font-weight-asian="bold" style:font-weight-complex="bold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AI Finance Automation Tool for Purchase Invoices and Bank Statement Matching</text:p>
      <text:p text:style-name="P2">1. Project Summary</text:p>
      <text:p text:style-name="Normal">Borek Finance currently manages purchase invoices manually in an Excel file called<text:s/><text:span text:style-name="T3">Purchase Invoices Database</text:span>.</text:p>
      <text:p text:style-name="Normal">The goal of this project is to build an AI-powered internal tool that can:</text:p>
      <text:list text:style-name="LFO1" text:continue-numbering="true">
        <text:list-item>
          <text:p text:style-name="P4">Read invoices from uploaded files, PDFs, scanned documents, or photos.<text:s/></text:p>
        </text:list-item>
        <text:list-item>
          <text:p text:style-name="P5">Extract the required invoice information automatically.<text:s/></text:p>
        </text:list-item>
        <text:list-item>
          <text:p text:style-name="P6">Save the extracted data into the correct columns of the<text:s/><text:span text:style-name="T7">Purchase Invoices Database Excel</text:span>.<text:s/></text:p>
        </text:list-item>
        <text:list-item>
          <text:p text:style-name="P8">Read the<text:s/><text:span text:style-name="T9">Bank Statement Excel</text:span>.<text:s/></text:p>
        </text:list-item>
        <text:list-item>
          <text:p text:style-name="P10">Detect invoice numbers inside the bank statement<text:s/><text:span text:style-name="T11">Comment / Komenti</text:span><text:s/>column.<text:s/></text:p>
        </text:list-item>
        <text:list-item>
          <text:p text:style-name="P12">Match those invoice numbers with the<text:s/><text:span text:style-name="T13">Invoice Number</text:span><text:s/>column in the Purchase Invoices Database.<text:s/></text:p>
        </text:list-item>
        <text:list-item>
          <text:p text:style-name="P14">Automatically fill the<text:s/><text:span text:style-name="T15">paid at (Date)</text:span><text:s/>column in the Purchase Invoices Database.<text:s/></text:p>
        </text:list-item>
        <text:list-item>
          <text:p text:style-name="P16">Leave the<text:s/><text:span text:style-name="T17">paid by</text:span><text:s/>column manual for the Finance team.<text:s/></text:p>
        </text:list-item>
      </text:list>
      <text:p text:style-name="Normal">The system should help Finance reduce repetitive work, but it should not fully replace human review. If the AI is unsure, the row must be marked for manual checking.</text:p>
      <text:p text:style-name="Normal"><draw:custom-shape svg:x="0in" svg:y="0in" svg:width="45.51042in" svg:height="0.00139in" draw:z-index="0" draw:id="id0" draw:style-name="a0" draw:name="Horizontal Line 181" text:anchor-type="as-char"><svg:title/><svg:desc/><draw:enhanced-geometry draw:type="non-primitive" svg:viewBox="0 0 21600 21600" draw:enhanced-path="M 0 0 L 21600 0 21600 21600 0 21600 Z N"/></draw:custom-shape></text:p>
      <text:p text:style-name="P18">2. Main Files Used in the Process</text:p>
      <text:p text:style-name="P19">2.1 Purchase Invoices Database Excel</text:p>
      <text:p text:style-name="Normal">This is the main Excel file where extracted invoice data will be saved.</text:p>
      <text:p text:style-name="Normal">The current columns are: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header-rows>
          <table:table-row table:style-name="TableRow24">
            <table:table-cell table:style-name="TableCell25">
              <text:p text:style-name="P26">Column</text:p>
            </table:table-cell>
            <table:table-cell table:style-name="TableCell27">
              <text:p text:style-name="P28">Description</text:p>
            </table:table-cell>
            <table:table-cell table:style-name="TableCell29">
              <text:p text:style-name="P30">Filled By</text:p>
            </table:table-cell>
          </table:table-row>
        </table:table-header-rows>
        <table:table-row table:style-name="TableRow31">
          <table:table-cell table:style-name="TableCell32">
            <text:p text:style-name="Normal">Invoice Date</text:p>
          </table:table-cell>
          <table:table-cell table:style-name="TableCell33">
            <text:p text:style-name="Normal">Date written on the invoice</text:p>
          </table:table-cell>
          <table:table-cell table:style-name="TableCell34">
            <text:p text:style-name="Normal">AI</text:p>
          </table:table-cell>
        </table:table-row>
        <table:table-row table:style-name="TableRow35">
          <table:table-cell table:style-name="TableCell36">
            <text:p text:style-name="Normal">Name of Company</text:p>
          </table:table-cell>
          <table:table-cell table:style-name="TableCell37">
            <text:p text:style-name="Normal">Supplier/company name</text:p>
          </table:table-cell>
          <table:table-cell table:style-name="TableCell38">
            <text:p text:style-name="Normal">AI</text:p>
          </table:table-cell>
        </table:table-row>
        <table:table-row table:style-name="TableRow39">
          <table:table-cell table:style-name="TableCell40">
            <text:p text:style-name="Normal">Adress of Company</text:p>
          </table:table-cell>
          <table:table-cell table:style-name="TableCell41">
            <text:p text:style-name="Normal">Supplier address</text:p>
          </table:table-cell>
          <table:table-cell table:style-name="TableCell42">
            <text:p text:style-name="Normal">AI</text:p>
          </table:table-cell>
        </table:table-row>
        <text:soft-page-break/>
        <table:table-row table:style-name="TableRow43">
          <table:table-cell table:style-name="TableCell44">
            <text:p text:style-name="Normal">Invoice Number</text:p>
          </table:table-cell>
          <table:table-cell table:style-name="TableCell45">
            <text:p text:style-name="Normal">Unique invoice number/reference</text:p>
          </table:table-cell>
          <table:table-cell table:style-name="TableCell46">
            <text:p text:style-name="Normal">AI</text:p>
          </table:table-cell>
        </table:table-row>
        <table:table-row table:style-name="TableRow47">
          <table:table-cell table:style-name="TableCell48">
            <text:p text:style-name="Normal">Amount</text:p>
          </table:table-cell>
          <table:table-cell table:style-name="TableCell49">
            <text:p text:style-name="Normal">Invoice total amount</text:p>
          </table:table-cell>
          <table:table-cell table:style-name="TableCell50">
            <text:p text:style-name="Normal">AI</text:p>
          </table:table-cell>
        </table:table-row>
        <table:table-row table:style-name="TableRow51">
          <table:table-cell table:style-name="TableCell52">
            <text:p text:style-name="Normal">Account Details</text:p>
          </table:table-cell>
          <table:table-cell table:style-name="TableCell53">
            <text:p text:style-name="Normal">Bank/account/payment details from invoice</text:p>
          </table:table-cell>
          <table:table-cell table:style-name="TableCell54">
            <text:p text:style-name="Normal">AI</text:p>
          </table:table-cell>
        </table:table-row>
        <table:table-row table:style-name="TableRow55">
          <table:table-cell table:style-name="TableCell56">
            <text:p text:style-name="Normal">Internal Note/Description</text:p>
          </table:table-cell>
          <table:table-cell table:style-name="TableCell57">
            <text:p text:style-name="Normal">Short invoice description</text:p>
          </table:table-cell>
          <table:table-cell table:style-name="TableCell58">
            <text:p text:style-name="Normal">AI</text:p>
          </table:table-cell>
        </table:table-row>
        <table:table-row table:style-name="TableRow59">
          <table:table-cell table:style-name="TableCell60">
            <text:p text:style-name="Normal">Client / Employee Related</text:p>
          </table:table-cell>
          <table:table-cell table:style-name="TableCell61">
            <text:p text:style-name="Normal">Related client or employee, if visible</text:p>
          </table:table-cell>
          <table:table-cell table:style-name="TableCell62">
            <text:p text:style-name="Normal">AI suggestion or manual</text:p>
          </table:table-cell>
        </table:table-row>
        <table:table-row table:style-name="TableRow63">
          <table:table-cell table:style-name="TableCell64">
            <text:p text:style-name="Normal">paid at (Date)</text:p>
          </table:table-cell>
          <table:table-cell table:style-name="TableCell65">
            <text:p text:style-name="Normal">Date when invoice was paid</text:p>
          </table:table-cell>
          <table:table-cell table:style-name="TableCell66">
            <text:p text:style-name="Normal">System from bank statement</text:p>
          </table:table-cell>
        </table:table-row>
        <table:table-row table:style-name="TableRow67">
          <table:table-cell table:style-name="TableCell68">
            <text:p text:style-name="Normal">paid by</text:p>
          </table:table-cell>
          <table:table-cell table:style-name="TableCell69">
            <text:p text:style-name="Normal">Person/account who paid</text:p>
          </table:table-cell>
          <table:table-cell table:style-name="TableCell70">
            <text:p text:style-name="Normal">Manual by Finance</text:p>
          </table:table-cell>
        </table:table-row>
        <table:table-row table:style-name="TableRow71">
          <table:table-cell table:style-name="TableCell72">
            <text:p text:style-name="Normal">Fixed/Not fixed</text:p>
          </table:table-cell>
          <table:table-cell table:style-name="TableCell73">
            <text:p text:style-name="Normal">Internal finance status</text:p>
          </table:table-cell>
          <table:table-cell table:style-name="TableCell74">
            <text:p text:style-name="Normal">Manual or dropdown</text:p>
          </table:table-cell>
        </table:table-row>
        <table:table-row table:style-name="TableRow75">
          <table:table-cell table:style-name="TableCell76">
            <text:p text:style-name="Normal">Category</text:p>
          </table:table-cell>
          <table:table-cell table:style-name="TableCell77">
            <text:p text:style-name="Normal">Expense category</text:p>
          </table:table-cell>
          <table:table-cell table:style-name="TableCell78">
            <text:p text:style-name="Normal">AI suggestion + manual correction</text:p>
          </table:table-cell>
        </table:table-row>
      </table:table>
      <text:p text:style-name="Normal">Important:<text:line-break/>The<text:s/><text:span text:style-name="T79">Purchase Invoices Database</text:span><text:s/>is the main output file/database of the system.</text:p>
      <text:p text:style-name="Normal"><draw:custom-shape svg:x="0in" svg:y="0in" svg:width="45.51042in" svg:height="0.00139in" draw:z-index="0" draw:id="id1" draw:style-name="a1" draw:name="Horizontal Line 182" text:anchor-type="as-char"><svg:title/><svg:desc/><draw:enhanced-geometry draw:type="non-primitive" svg:viewBox="0 0 21600 21600" draw:enhanced-path="M 0 0 L 21600 0 21600 21600 0 21600 Z N"/></draw:custom-shape></text:p>
      <text:p text:style-name="P80">2.2 Bank Statement Excel</text:p>
      <text:p text:style-name="Normal">This file is uploaded separately by Finance.</text:p>
      <text:p text:style-name="Normal">Important columns from the bank statement:</text:p>
      <table:table table:style-name="Table81">
        <table:table-columns>
          <table:table-column table:style-name="TableColumn82"/>
          <table:table-column table:style-name="TableColumn83"/>
        </table:table-columns>
        <table:table-header-rows>
          <table:table-row table:style-name="TableRow84">
            <table:table-cell table:style-name="TableCell85">
              <text:p text:style-name="P86">Bank Statement Column</text:p>
            </table:table-cell>
            <table:table-cell table:style-name="TableCell87">
              <text:p text:style-name="P88">Usage</text:p>
            </table:table-cell>
          </table:table-row>
        </table:table-header-rows>
        <table:table-row table:style-name="TableRow89">
          <table:table-cell table:style-name="TableCell90">
            <text:p text:style-name="Normal">Data / Date</text:p>
          </table:table-cell>
          <table:table-cell table:style-name="TableCell91">
            <text:p text:style-name="Normal">Payment date</text:p>
          </table:table-cell>
        </table:table-row>
        <table:table-row table:style-name="TableRow92">
          <table:table-cell table:style-name="TableCell93">
            <text:p text:style-name="Normal">Vlera e debituar / Debited amount</text:p>
          </table:table-cell>
          <table:table-cell table:style-name="TableCell94">
            <text:p text:style-name="Normal">Amount paid out</text:p>
          </table:table-cell>
        </table:table-row>
        <table:table-row table:style-name="TableRow95">
          <table:table-cell table:style-name="TableCell96">
            <text:p text:style-name="Normal">Vlera e kredituar / Credited amount</text:p>
          </table:table-cell>
          <table:table-cell table:style-name="TableCell97">
            <text:p text:style-name="Normal">Amount received</text:p>
          </table:table-cell>
        </table:table-row>
        <text:soft-page-break/>
        <table:table-row table:style-name="TableRow98">
          <table:table-cell table:style-name="TableCell99">
            <text:p text:style-name="Normal">Tipi i veprimit / Type of transaction</text:p>
          </table:table-cell>
          <table:table-cell table:style-name="TableCell100">
            <text:p text:style-name="Normal">Transaction type</text:p>
          </table:table-cell>
        </table:table-row>
        <table:table-row table:style-name="TableRow101">
          <table:table-cell table:style-name="TableCell102">
            <text:p text:style-name="Normal">Komenti / Comment</text:p>
          </table:table-cell>
          <table:table-cell table:style-name="TableCell103">
            <text:p text:style-name="Normal">Contains invoice number/reference</text:p>
          </table:table-cell>
        </table:table-row>
      </table:table>
      <text:p text:style-name="Normal">The most important column for matching is:</text:p>
      <text:p text:style-name="Normal">Komenti / Comment</text:p>
      <text:p text:style-name="Normal">The system must detect invoice numbers from this comment field.</text:p>
      <text:p text:style-name="Normal"><draw:custom-shape svg:x="0in" svg:y="0in" svg:width="45.51042in" svg:height="0.00139in" draw:z-index="0" draw:id="id2" draw:style-name="a2" draw:name="Horizontal Line 183" text:anchor-type="as-char"><svg:title/><svg:desc/><draw:enhanced-geometry draw:type="non-primitive" svg:viewBox="0 0 21600 21600" draw:enhanced-path="M 0 0 L 21600 0 21600 21600 0 21600 Z N"/></draw:custom-shape></text:p>
      <text:p text:style-name="P104">3. Correct End-to-End Workflow</text:p>
      <text:p text:style-name="Normal">1. Finance uploads invoice files:<text:line-break/><text:s text:c="3"/>- PDF<text:line-break/><text:s text:c="3"/>- scanned PDF<text:line-break/><text:s text:c="3"/>- photo<text:line-break/><text:s text:c="3"/>- image<text:line-break/><text:s text:c="3"/>- digital invoice<text:line-break/><text:line-break/>2. AI reads each invoice.<text:line-break/><text:line-break/>3. AI extracts:<text:line-break/><text:s text:c="3"/>- invoice date<text:line-break/><text:s text:c="3"/>- company name<text:line-break/><text:s text:c="3"/>- company address<text:line-break/><text:s text:c="3"/>- invoice number<text:line-break/><text:s text:c="3"/>- amount<text:line-break/><text:s text:c="3"/>- account details<text:line-break/><text:s text:c="3"/>- description<text:line-break/><text:s text:c="3"/>- possible category<text:line-break/><text:line-break/>4. Extracted data is saved into the Purchase Invoices Database.<text:line-break/><text:line-break/>5. Finance uploads Bank Statement Excel.<text:line-break/><text:line-break/>6. System reads the bank statement rows.<text:line-break/><text:line-break/><text:soft-page-break/>7. System checks the Komenti / Comment column.<text:line-break/><text:line-break/>8. AI or regex detects invoice numbers inside the comment text.<text:line-break/><text:line-break/>9. System compares detected invoice numbers with Invoice Number in Purchase Invoices Database.<text:line-break/><text:line-break/>10. If a match is found:<text:line-break/><text:s text:c="4"/>- take Data / Date from Bank Statement<text:line-break/><text:s text:c="4"/>- paste it into paid at (Date) in Purchase Invoices Database<text:line-break/><text:line-break/>11. paid by remains empty/manual.<text:line-break/><text:line-break/>12. If no match is found:<text:line-break/><text:s text:c="4"/>- mark row as Needs Review.</text:p>
      <text:p text:style-name="Normal"><draw:custom-shape svg:x="0in" svg:y="0in" svg:width="45.51042in" svg:height="0.00139in" draw:z-index="0" draw:id="id3" draw:style-name="a3" draw:name="Horizontal Line 184" text:anchor-type="as-char"><svg:title/><svg:desc/><draw:enhanced-geometry draw:type="non-primitive" svg:viewBox="0 0 21600 21600" draw:enhanced-path="M 0 0 L 21600 0 21600 21600 0 21600 Z N"/></draw:custom-shape></text:p>
      <text:p text:style-name="P105">4. Main Functional Requirements</text:p>
      <text:p text:style-name="P106">Requirement 1: Invoice Upload</text:p>
      <text:p text:style-name="Normal">The system must allow users to upload one or multiple invoice files.</text:p>
      <text:p text:style-name="Normal">Supported formats:</text:p>
      <text:p text:style-name="Normal">PDF<text:line-break/>JPG<text:line-break/>JPEG<text:line-break/>PNG<text:line-break/>Scanned PDF<text:line-break/>Excel, optional later</text:p>
      <text:p text:style-name="Normal">The upload page should allow batch upload because Finance may upload many invoices at once.</text:p>
      <text:p text:style-name="Normal">Each uploaded file should be stored with metadata:</text:p>
      <table:table table:style-name="Table107">
        <table:table-columns>
          <table:table-column table:style-name="TableColumn108"/>
          <table:table-column table:style-name="TableColumn109"/>
        </table:table-columns>
        <table:table-header-rows>
          <table:table-row table:style-name="TableRow110">
            <table:table-cell table:style-name="TableCell111">
              <text:p text:style-name="P112">Metadata</text:p>
            </table:table-cell>
            <table:table-cell table:style-name="TableCell113">
              <text:p text:style-name="P114">Example</text:p>
            </table:table-cell>
          </table:table-row>
        </table:table-header-rows>
        <table:table-row table:style-name="TableRow115">
          <table:table-cell table:style-name="TableCell116">
            <text:p text:style-name="Normal">Original file name</text:p>
          </table:table-cell>
          <table:table-cell table:style-name="TableCell117">
            <text:p text:style-name="Normal">adia_invoice_may.pdf</text:p>
          </table:table-cell>
        </table:table-row>
        <text:soft-page-break/>
        <table:table-row table:style-name="TableRow118">
          <table:table-cell table:style-name="TableCell119">
            <text:p text:style-name="Normal">Upload date</text:p>
          </table:table-cell>
          <table:table-cell table:style-name="TableCell120">
            <text:p text:style-name="Normal">2026-05-20</text:p>
          </table:table-cell>
        </table:table-row>
        <table:table-row table:style-name="TableRow121">
          <table:table-cell table:style-name="TableCell122">
            <text:p text:style-name="Normal">Uploaded by</text:p>
          </table:table-cell>
          <table:table-cell table:style-name="TableCell123">
            <text:p text:style-name="Normal">Finance user</text:p>
          </table:table-cell>
        </table:table-row>
        <table:table-row table:style-name="TableRow124">
          <table:table-cell table:style-name="TableCell125">
            <text:p text:style-name="Normal">Processing status</text:p>
          </table:table-cell>
          <table:table-cell table:style-name="TableCell126">
            <text:p text:style-name="Normal">Pending / Processed / Failed</text:p>
          </table:table-cell>
        </table:table-row>
        <table:table-row table:style-name="TableRow127">
          <table:table-cell table:style-name="TableCell128">
            <text:p text:style-name="Normal">Review status</text:p>
          </table:table-cell>
          <table:table-cell table:style-name="TableCell129">
            <text:p text:style-name="Normal">Approved / Needs Review</text:p>
          </table:table-cell>
        </table:table-row>
      </table:table>
      <text:p text:style-name="Normal"><draw:custom-shape svg:x="0in" svg:y="0in" svg:width="45.51042in" svg:height="0.00139in" draw:z-index="0" draw:id="id4" draw:style-name="a4" draw:name="Horizontal Line 185" text:anchor-type="as-char"><svg:title/><svg:desc/><draw:enhanced-geometry draw:type="non-primitive" svg:viewBox="0 0 21600 21600" draw:enhanced-path="M 0 0 L 21600 0 21600 21600 0 21600 Z N"/></draw:custom-shape></text:p>
      <text:p text:style-name="P130">Requirement 2: AI Invoice Extraction</text:p>
      <text:p text:style-name="Normal">The AI must extract structured data from every invoice.</text:p>
      <text:p text:style-name="Normal">Required fields:</text:p>
      <text:p text:style-name="Normal">{<text:line-break/><text:s text:c="2"/>"invoice_date": "",<text:line-break/><text:s text:c="2"/>"name_of_company": "",<text:line-break/><text:s text:c="2"/>"address_of_company": "",<text:line-break/><text:s text:c="2"/>"invoice_number": "",<text:line-break/><text:s text:c="2"/>"amount": "",<text:line-break/><text:s text:c="2"/>"currency": "",<text:line-break/><text:s text:c="2"/>"account_details": "",<text:line-break/><text:s text:c="2"/>"internal_note_description": "",<text:line-break/><text:s text:c="2"/>"client_employee_related": "",<text:line-break/><text:s text:c="2"/>"category": "",<text:line-break/><text:s text:c="2"/>"confidence_score": "",<text:line-break/><text:s text:c="2"/>"needs_review": true<text:line-break/>}</text:p>
      <text:p text:style-name="Normal">The AI should not return only free text.<text:line-break/>It must return structured JSON so the backend can save it correctly.</text:p>
      <text:p text:style-name="Normal"><draw:custom-shape svg:x="0in" svg:y="0in" svg:width="45.51042in" svg:height="0.00139in" draw:z-index="0" draw:id="id5" draw:style-name="a5" draw:name="Horizontal Line 186" text:anchor-type="as-char"><svg:title/><svg:desc/><draw:enhanced-geometry draw:type="non-primitive" svg:viewBox="0 0 21600 21600" draw:enhanced-path="M 0 0 L 21600 0 21600 21600 0 21600 Z N"/></draw:custom-shape></text:p>
      <text:p text:style-name="P131">Requirement 3: Purchase Invoices Database Update</text:p>
      <text:p text:style-name="Normal">After extraction, the system must insert a new row into the Purchase Invoices Database.</text:p>
      <text:p text:style-name="Normal">Mapping:</text:p>
      <table:table table:style-name="Table132">
        <table:table-columns>
          <table:table-column table:style-name="TableColumn133"/>
          <table:table-column table:style-name="TableColumn134"/>
        </table:table-columns>
        <table:table-header-rows>
          <table:table-row table:style-name="TableRow135">
            <table:table-cell table:style-name="TableCell136">
              <text:soft-page-break/>
              <text:p text:style-name="P137">AI Extracted Field</text:p>
            </table:table-cell>
            <table:table-cell table:style-name="TableCell138">
              <text:p text:style-name="P139">Excel Column</text:p>
            </table:table-cell>
          </table:table-row>
        </table:table-header-rows>
        <table:table-row table:style-name="TableRow140">
          <table:table-cell table:style-name="TableCell141">
            <text:p text:style-name="Normal">invoice_date</text:p>
          </table:table-cell>
          <table:table-cell table:style-name="TableCell142">
            <text:p text:style-name="Normal">Invoice Date</text:p>
          </table:table-cell>
        </table:table-row>
        <table:table-row table:style-name="TableRow143">
          <table:table-cell table:style-name="TableCell144">
            <text:p text:style-name="Normal">name_of_company</text:p>
          </table:table-cell>
          <table:table-cell table:style-name="TableCell145">
            <text:p text:style-name="Normal">Name of Company</text:p>
          </table:table-cell>
        </table:table-row>
        <table:table-row table:style-name="TableRow146">
          <table:table-cell table:style-name="TableCell147">
            <text:p text:style-name="Normal">address_of_company</text:p>
          </table:table-cell>
          <table:table-cell table:style-name="TableCell148">
            <text:p text:style-name="Normal">Adress of Company</text:p>
          </table:table-cell>
        </table:table-row>
        <table:table-row table:style-name="TableRow149">
          <table:table-cell table:style-name="TableCell150">
            <text:p text:style-name="Normal">invoice_number</text:p>
          </table:table-cell>
          <table:table-cell table:style-name="TableCell151">
            <text:p text:style-name="Normal">Invoice Number</text:p>
          </table:table-cell>
        </table:table-row>
        <table:table-row table:style-name="TableRow152">
          <table:table-cell table:style-name="TableCell153">
            <text:p text:style-name="Normal">amount</text:p>
          </table:table-cell>
          <table:table-cell table:style-name="TableCell154">
            <text:p text:style-name="Normal">Amount</text:p>
          </table:table-cell>
        </table:table-row>
        <table:table-row table:style-name="TableRow155">
          <table:table-cell table:style-name="TableCell156">
            <text:p text:style-name="Normal">account_details</text:p>
          </table:table-cell>
          <table:table-cell table:style-name="TableCell157">
            <text:p text:style-name="Normal">Account Details</text:p>
          </table:table-cell>
        </table:table-row>
        <table:table-row table:style-name="TableRow158">
          <table:table-cell table:style-name="TableCell159">
            <text:p text:style-name="Normal">internal_note_description</text:p>
          </table:table-cell>
          <table:table-cell table:style-name="TableCell160">
            <text:p text:style-name="Normal">Internal Note/Description</text:p>
          </table:table-cell>
        </table:table-row>
        <table:table-row table:style-name="TableRow161">
          <table:table-cell table:style-name="TableCell162">
            <text:p text:style-name="Normal">client_employee_related</text:p>
          </table:table-cell>
          <table:table-cell table:style-name="TableCell163">
            <text:p text:style-name="Normal">Client / Employee Related</text:p>
          </table:table-cell>
        </table:table-row>
        <table:table-row table:style-name="TableRow164">
          <table:table-cell table:style-name="TableCell165">
            <text:p text:style-name="Normal">paid_at_date</text:p>
          </table:table-cell>
          <table:table-cell table:style-name="TableCell166">
            <text:p text:style-name="Normal">paid at (Date)</text:p>
          </table:table-cell>
        </table:table-row>
        <table:table-row table:style-name="TableRow167">
          <table:table-cell table:style-name="TableCell168">
            <text:p text:style-name="Normal">paid_by</text:p>
          </table:table-cell>
          <table:table-cell table:style-name="TableCell169">
            <text:p text:style-name="Normal">paid by</text:p>
          </table:table-cell>
        </table:table-row>
        <table:table-row table:style-name="TableRow170">
          <table:table-cell table:style-name="TableCell171">
            <text:p text:style-name="Normal">fixed_status</text:p>
          </table:table-cell>
          <table:table-cell table:style-name="TableCell172">
            <text:p text:style-name="Normal">Fixed/Not fixed</text:p>
          </table:table-cell>
        </table:table-row>
        <table:table-row table:style-name="TableRow173">
          <table:table-cell table:style-name="TableCell174">
            <text:p text:style-name="Normal">category</text:p>
          </table:table-cell>
          <table:table-cell table:style-name="TableCell175">
            <text:p text:style-name="Normal">Category</text:p>
          </table:table-cell>
        </table:table-row>
      </table:table>
      <text:p text:style-name="Normal">Important:</text:p>
      <text:p text:style-name="Normal">paid at (Date) should NOT be filled from invoice extraction.<text:line-break/>paid at (Date) should be filled only from the bank statement matching process.<text:line-break/>paid by should remain manual.</text:p>
      <text:p text:style-name="Normal"><draw:custom-shape svg:x="0in" svg:y="0in" svg:width="45.51042in" svg:height="0.00139in" draw:z-index="0" draw:id="id6" draw:style-name="a6" draw:name="Horizontal Line 187" text:anchor-type="as-char"><svg:title/><svg:desc/><draw:enhanced-geometry draw:type="non-primitive" svg:viewBox="0 0 21600 21600" draw:enhanced-path="M 0 0 L 21600 0 21600 21600 0 21600 Z N"/></draw:custom-shape></text:p>
      <text:p text:style-name="P176">Requirement 4: Bank Statement Upload</text:p>
      <text:p text:style-name="Normal">The system must allow the Finance team to upload the Bank Statement Excel file.</text:p>
      <text:p text:style-name="Normal">The backend must read the bank statement and identify the header row.</text:p>
      <text:p text:style-name="Normal">From the uploaded example, the relevant bank statement headers include:</text:p>
      <text:p text:style-name="Normal">Data / Date<text:line-break/>Vlera e debituar / Debited amount<text:line-break/>Vlera e kredituar / Credited amount<text:line-break/><text:soft-page-break/>Tipi i veprimit / Type of transaction<text:line-break/>Komenti / Comment</text:p>
      <text:p text:style-name="Normal">The system must process each transaction row and store:</text:p>
      <text:p text:style-name="Normal">{<text:line-break/><text:s text:c="2"/>"transaction_date": "",<text:line-break/><text:s text:c="2"/>"debited_amount": "",<text:line-break/><text:s text:c="2"/>"credited_amount": "",<text:line-break/><text:s text:c="2"/>"transaction_type": "",<text:line-break/><text:s text:c="2"/>"comment": "",<text:line-break/><text:s text:c="2"/>"detected_invoice_numbers": []<text:line-break/>}</text:p>
      <text:p text:style-name="Normal"><draw:custom-shape svg:x="0in" svg:y="0in" svg:width="45.51042in" svg:height="0.00139in" draw:z-index="0" draw:id="id7" draw:style-name="a7" draw:name="Horizontal Line 188" text:anchor-type="as-char"><svg:title/><svg:desc/><draw:enhanced-geometry draw:type="non-primitive" svg:viewBox="0 0 21600 21600" draw:enhanced-path="M 0 0 L 21600 0 21600 21600 0 21600 Z N"/></draw:custom-shape></text:p>
      <text:p text:style-name="P177">5. Invoice Number Detection Logic</text:p>
      <text:p text:style-name="Normal">Invoice numbers can appear in different formats inside the bank statement comment.</text:p>
      <text:p text:style-name="Normal">The system should detect patterns like:</text:p>
      <text:p text:style-name="Normal">INV-2026-001<text:line-break/>2026/001<text:line-break/>26063<text:line-break/>26.063<text:line-break/>Invoice 26063<text:line-break/>Fatura 26063<text:line-break/>Ref: 26063<text:line-break/>Payment for invoice 26063</text:p>
      <text:p text:style-name="Normal">The interns should implement a function like:</text:p>
      <text:p text:style-name="Normal">def extract_invoice_numbers(comment: str) -&gt; list[str]:<text:line-break/><text:s text:c="4"/>"""<text:line-break/><text:s text:c="4"/>Detect possible invoice numbers from bank statement comment text.<text:line-break/><text:s text:c="4"/>Return a list of normalized invoice number candidates.<text:line-break/><text:s text:c="4"/>"""</text:p>
      <text:p text:style-name="Normal">The system should normalize invoice numbers before matching.</text:p>
      <text:p text:style-name="Normal">Example normalization:</text:p>
      <text:soft-page-break/>
      <text:p text:style-name="Normal">"26.063" <text:s/>-&gt; "26063"<text:line-break/>"INV 2026 001" -&gt; "INV2026001"<text:line-break/>"invoice-26063" -&gt; "26063"</text:p>
      <text:p text:style-name="Normal"><draw:custom-shape svg:x="0in" svg:y="0in" svg:width="45.51042in" svg:height="0.00139in" draw:z-index="0" draw:id="id8" draw:style-name="a8" draw:name="Horizontal Line 189" text:anchor-type="as-char"><svg:title/><svg:desc/><draw:enhanced-geometry draw:type="non-primitive" svg:viewBox="0 0 21600 21600" draw:enhanced-path="M 0 0 L 21600 0 21600 21600 0 21600 Z N"/></draw:custom-shape></text:p>
      <text:p text:style-name="P178">6. Matching Logic</text:p>
      <text:p text:style-name="P179">6.1 Exact Matching</text:p>
      <text:p text:style-name="Normal">First, the system should try exact invoice number matching.</text:p>
      <text:p text:style-name="Normal">Bank Statement Comment:<text:line-break/>"Payment for invoice 26063"<text:line-break/><text:line-break/>Detected invoice number:<text:line-break/>26063<text:line-break/><text:line-break/>Purchase Invoices Database:<text:line-break/>Invoice Number = 26063<text:line-break/><text:line-break/>Result:<text:line-break/>Match found<text:line-break/>paid at (Date) = Bank Statement Data / Date</text:p>
      <text:p text:style-name="Normal"><draw:custom-shape svg:x="0in" svg:y="0in" svg:width="45.51042in" svg:height="0.00139in" draw:z-index="0" draw:id="id9" draw:style-name="a9" draw:name="Horizontal Line 190" text:anchor-type="as-char"><svg:title/><svg:desc/><draw:enhanced-geometry draw:type="non-primitive" svg:viewBox="0 0 21600 21600" draw:enhanced-path="M 0 0 L 21600 0 21600 21600 0 21600 Z N"/></draw:custom-shape></text:p>
      <text:p text:style-name="P180">6.2 Multiple Invoice Numbers in One Comment</text:p>
      <text:p text:style-name="Normal">Sometimes one bank transaction may include more than one invoice number.</text:p>
      <text:p text:style-name="Normal">Example:</text:p>
      <text:p text:style-name="Normal">Comment:<text:line-break/>Payment for invoices 26063, 26060, 260658<text:line-break/>Date:<text:line-break/>25.02.2026</text:p>
      <text:p text:style-name="Normal">The system should detect all invoice numbers:</text:p>
      <text:p text:style-name="Normal">["26063", "26060", "260658"]</text:p>
      <text:p text:style-name="Normal">Then it should update all matching rows in the Purchase Invoices Database with the same payment date.</text:p>
      <text:soft-page-break/>
      <text:p text:style-name="Normal"><draw:custom-shape svg:x="0in" svg:y="0in" svg:width="45.51042in" svg:height="0.00139in" draw:z-index="0" draw:id="id10" draw:style-name="a10" draw:name="Horizontal Line 191" text:anchor-type="as-char"><svg:title/><svg:desc/><draw:enhanced-geometry draw:type="non-primitive" svg:viewBox="0 0 21600 21600" draw:enhanced-path="M 0 0 L 21600 0 21600 21600 0 21600 Z N"/></draw:custom-shape></text:p>
      <text:p text:style-name="P181">6.3 Batch Payment Matching</text:p>
      <text:p text:style-name="Normal">If multiple invoices are paid in one batch, the system should support this logic:</text:p>
      <text:p text:style-name="Normal">One bank transaction can pay multiple invoices.<text:line-break/>If the comment contains several invoice numbers, update all matching invoices.<text:line-break/>If the comment does not clearly contain all invoice numbers, mark as Needs Review.</text:p>
      <text:p text:style-name="Normal">For MVP, do not overcomplicate the batch logic.</text:p>
      <text:p text:style-name="Normal">MVP rule:</text:p>
      <text:p text:style-name="Normal">If invoice numbers are visible in the comment, match them.<text:line-break/>If invoice numbers are not visible, do not guess.<text:line-break/>Send to manual review.</text:p>
      <text:p text:style-name="Normal">Advanced phase:</text:p>
      <text:p text:style-name="Normal">Use amount combination matching:<text:line-break/>Sum of several unpaid invoices = debited bank amount<text:line-break/>Same supplier<text:line-break/>Same date range<text:line-break/>Then suggest a possible batch match</text:p>
      <text:p text:style-name="Normal"><draw:custom-shape svg:x="0in" svg:y="0in" svg:width="45.51042in" svg:height="0.00139in" draw:z-index="0" draw:id="id11" draw:style-name="a11" draw:name="Horizontal Line 192" text:anchor-type="as-char"><svg:title/><svg:desc/><draw:enhanced-geometry draw:type="non-primitive" svg:viewBox="0 0 21600 21600" draw:enhanced-path="M 0 0 L 21600 0 21600 21600 0 21600 Z N"/></draw:custom-shape></text:p>
      <text:p text:style-name="P182">6.4 No Match Found</text:p>
      <text:p text:style-name="Normal">If no invoice number from the bank statement comment matches the Purchase Invoices Database, the system should mark it as:</text:p>
      <text:p text:style-name="Normal">Needs Review</text:p>
      <text:p text:style-name="Normal">Possible reasons:</text:p>
      <text:p text:style-name="Normal">Invoice number not uploaded yet<text:line-break/>Invoice number written differently<text:line-break/>Comment does not contain invoice number<text:line-break/>Invoice belongs to another project<text:line-break/>Manual finance case</text:p>
      <text:p text:style-name="Normal"><draw:custom-shape svg:x="0in" svg:y="0in" svg:width="45.51042in" svg:height="0.00139in" draw:z-index="0" draw:id="id12" draw:style-name="a12" draw:name="Horizontal Line 193" text:anchor-type="as-char"><svg:title/><svg:desc/><draw:enhanced-geometry draw:type="non-primitive" svg:viewBox="0 0 21600 21600" draw:enhanced-path="M 0 0 L 21600 0 21600 21600 0 21600 Z N"/></draw:custom-shape></text:p>
      <text:p text:style-name="P183">7. Paid Date Update Logic</text:p>
      <text:soft-page-break/>
      <text:p text:style-name="Normal">The paid date update is one of the most important features.</text:p>
      <text:p text:style-name="Normal">Pseudo logic:</text:p>
      <text:p text:style-name="Normal">for transaction in bank_statement_rows:<text:line-break/><text:s text:c="4"/>comment = transaction["comment"]<text:line-break/><text:s text:c="4"/>transaction_date = transaction["date"]<text:line-break/><text:line-break/><text:s text:c="4"/>invoice_numbers = extract_invoice_numbers(comment)<text:line-break/><text:line-break/><text:s text:c="4"/>for invoice_number in invoice_numbers:<text:line-break/><text:s text:c="8"/>matched_invoice = find_invoice_by_number(invoice_number)<text:line-break/><text:line-break/><text:s text:c="8"/>if matched_invoice:<text:line-break/><text:s text:c="12"/>matched_invoice["paid at (Date)"] = transaction_date<text:line-break/><text:s text:c="12"/>matched_invoice["match_status"] = "Matched"<text:line-break/><text:s text:c="8"/>else:<text:line-break/><text:s text:c="12"/>create_review_task(transaction, invoice_number)</text:p>
      <text:p text:style-name="Normal">Important:</text:p>
      <text:p text:style-name="Normal">Only paid at (Date) is updated automatically.<text:line-break/>paid by remains manual.</text:p>
      <text:p text:style-name="Normal"><draw:custom-shape svg:x="0in" svg:y="0in" svg:width="45.51042in" svg:height="0.00139in" draw:z-index="0" draw:id="id13" draw:style-name="a13" draw:name="Horizontal Line 194" text:anchor-type="as-char"><svg:title/><svg:desc/><draw:enhanced-geometry draw:type="non-primitive" svg:viewBox="0 0 21600 21600" draw:enhanced-path="M 0 0 L 21600 0 21600 21600 0 21600 Z N"/></draw:custom-shape></text:p>
      <text:p text:style-name="P184">8. AI Confidence and Manual Review</text:p>
      <text:p text:style-name="Normal">The system must not blindly trust AI output.</text:p>
      <text:p text:style-name="Normal">Each invoice extraction should have a confidence score.</text:p>
      <text:p text:style-name="Normal">Example:</text:p>
      <table:table table:style-name="Table185">
        <table:table-columns>
          <table:table-column table:style-name="TableColumn186"/>
          <table:table-column table:style-name="TableColumn187"/>
        </table:table-columns>
        <table:table-header-rows>
          <table:table-row table:style-name="TableRow188">
            <table:table-cell table:style-name="TableCell189">
              <text:p text:style-name="P190">Confidence</text:p>
            </table:table-cell>
            <table:table-cell table:style-name="TableCell191">
              <text:p text:style-name="P192">Action</text:p>
            </table:table-cell>
          </table:table-row>
        </table:table-header-rows>
        <table:table-row table:style-name="TableRow193">
          <table:table-cell table:style-name="TableCell194">
            <text:p text:style-name="Normal">90–100%</text:p>
          </table:table-cell>
          <table:table-cell table:style-name="TableCell195">
            <text:p text:style-name="Normal">Auto-save</text:p>
          </table:table-cell>
        </table:table-row>
        <table:table-row table:style-name="TableRow196">
          <table:table-cell table:style-name="TableCell197">
            <text:p text:style-name="Normal">70–89%</text:p>
          </table:table-cell>
          <table:table-cell table:style-name="TableCell198">
            <text:p text:style-name="Normal">Save but mark for review</text:p>
          </table:table-cell>
        </table:table-row>
        <table:table-row table:style-name="TableRow199">
          <table:table-cell table:style-name="TableCell200">
            <text:p text:style-name="Normal">Below 70%</text:p>
          </table:table-cell>
          <table:table-cell table:style-name="TableCell201">
            <text:p text:style-name="Normal">Do not finalize, require manual review</text:p>
          </table:table-cell>
        </table:table-row>
      </table:table>
      <text:p text:style-name="Normal">A row should be marked as<text:s/><text:span text:style-name="T202">Needs Review</text:span><text:s/>when:</text:p>
      <text:soft-page-break/>
      <text:p text:style-name="Normal">Invoice number is missing<text:line-break/>Amount is missing<text:line-break/>Company name is unclear<text:line-break/>Invoice date is unclear<text:line-break/>Bank statement match failed<text:line-break/>Multiple possible matches found<text:line-break/>AI confidence is low</text:p>
      <text:p text:style-name="Normal"><draw:custom-shape svg:x="0in" svg:y="0in" svg:width="45.51042in" svg:height="0.00139in" draw:z-index="0" draw:id="id14" draw:style-name="a14" draw:name="Horizontal Line 195" text:anchor-type="as-char"><svg:title/><svg:desc/><draw:enhanced-geometry draw:type="non-primitive" svg:viewBox="0 0 21600 21600" draw:enhanced-path="M 0 0 L 21600 0 21600 21600 0 21600 Z N"/></draw:custom-shape></text:p>
      <text:p text:style-name="P203">9. Suggested System Architecture</text:p>
      <text:p text:style-name="P204">Backend</text:p>
      <text:p text:style-name="Normal">Recommended:</text:p>
      <text:p text:style-name="Normal">Python + FastAPI</text:p>
      <text:p text:style-name="Normal">Backend modules:</text:p>
      <text:p text:style-name="Normal">app/<text:line-break/><text:s text:c="2"/>main.py<text:line-break/><text:s text:c="2"/>routes/<text:line-break/><text:s text:c="4"/>invoice_routes.py<text:line-break/><text:s text:c="4"/>bank_statement_routes.py<text:line-break/><text:s text:c="4"/>reconciliation_routes.py<text:line-break/><text:s text:c="4"/>export_routes.py<text:line-break/><text:s text:c="2"/>services/<text:line-break/><text:s text:c="4"/>invoice_extraction_service.py<text:line-break/><text:s text:c="4"/>bank_statement_service.py<text:line-break/><text:s text:c="4"/>matching_service.py<text:line-break/><text:s text:c="4"/>excel_service.py<text:line-break/><text:s text:c="4"/>ai_validation_service.py<text:line-break/><text:s text:c="2"/>models/<text:line-break/><text:s text:c="4"/>invoice.py<text:line-break/><text:s text:c="4"/>bank_transaction.py<text:line-break/><text:s text:c="4"/>match_result.py<text:line-break/><text:s text:c="2"/>utils/<text:line-break/><text:s text:c="4"/>invoice_number_parser.py<text:line-break/><text:s text:c="4"/>normalization.py<text:line-break/><text:s text:c="4"/>file_storage.py</text:p>
      <text:soft-page-break/>
      <text:p text:style-name="Normal"><draw:custom-shape svg:x="0in" svg:y="0in" svg:width="45.51042in" svg:height="0.00139in" draw:z-index="0" draw:id="id15" draw:style-name="a15" draw:name="Horizontal Line 196" text:anchor-type="as-char"><svg:title/><svg:desc/><draw:enhanced-geometry draw:type="non-primitive" svg:viewBox="0 0 21600 21600" draw:enhanced-path="M 0 0 L 21600 0 21600 21600 0 21600 Z N"/></draw:custom-shape></text:p>
      <text:p text:style-name="P205">Frontend</text:p>
      <text:p text:style-name="Normal">Recommended:</text:p>
      <text:p text:style-name="Normal">React + TypeScript</text:p>
      <text:p text:style-name="Normal">Frontend pages:</text:p>
      <text:p text:style-name="Normal">Dashboard<text:line-break/>Upload Invoices<text:line-break/>Upload Bank Statement<text:line-break/>Purchase Invoices Table<text:line-break/>Bank Transactions Table<text:line-break/>Matching Results<text:line-break/>Manual Review Queue<text:line-break/>Export Page</text:p>
      <text:p text:style-name="Normal"><draw:custom-shape svg:x="0in" svg:y="0in" svg:width="45.51042in" svg:height="0.00139in" draw:z-index="0" draw:id="id16" draw:style-name="a16" draw:name="Horizontal Line 197" text:anchor-type="as-char"><svg:title/><svg:desc/><draw:enhanced-geometry draw:type="non-primitive" svg:viewBox="0 0 21600 21600" draw:enhanced-path="M 0 0 L 21600 0 21600 21600 0 21600 Z N"/></draw:custom-shape></text:p>
      <text:p text:style-name="P206">Database</text:p>
      <text:p text:style-name="Normal">Recommended:</text:p>
      <text:p text:style-name="Normal">PostgreSQL</text:p>
      <text:p text:style-name="Normal">Even if the output remains Excel, a database is recommended because it is safer and easier to manage.</text:p>
      <text:p text:style-name="Normal">Core tables:</text:p>
      <text:p text:style-name="Normal">invoices<text:line-break/>bank_transactions<text:line-break/>invoice_payment_matches<text:line-break/>uploaded_files<text:line-break/>review_tasks<text:line-break/>audit_logs<text:line-break/>users</text:p>
      <text:p text:style-name="Normal">The Excel file can be generated/exported from the database.</text:p>
      <text:p text:style-name="Normal"><draw:custom-shape svg:x="0in" svg:y="0in" svg:width="45.51042in" svg:height="0.00139in" draw:z-index="0" draw:id="id17" draw:style-name="a17" draw:name="Horizontal Line 198" text:anchor-type="as-char"><svg:title/><svg:desc/><draw:enhanced-geometry draw:type="non-primitive" svg:viewBox="0 0 21600 21600" draw:enhanced-path="M 0 0 L 21600 0 21600 21600 0 21600 Z N"/></draw:custom-shape></text:p>
      <text:p text:style-name="P207">10. Suggested AI Tools</text:p>
      <text:soft-page-break/>
      <text:p text:style-name="Normal">For invoice extraction, interns can test two options.</text:p>
      <text:p text:style-name="P208">Option A: OpenAI Vision / GPT model</text:p>
      <text:p text:style-name="Normal">Use it to read invoice images/PDFs and extract JSON.</text:p>
      <text:p text:style-name="Normal">Good for:</text:p>
      <text:p text:style-name="Normal">Different invoice layouts<text:line-break/>Photos<text:line-break/>Scanned invoices<text:line-break/>Flexible field extraction<text:line-break/>Validation</text:p>
      <text:p text:style-name="P209">Option B: Google Document AI Invoice Parser</text:p>
      <text:p text:style-name="Normal">Good for:</text:p>
      <text:p text:style-name="Normal">Invoice-specific extraction<text:line-break/>OCR<text:line-break/>Structured invoice fields<text:line-break/>Production reliability</text:p>
      <text:p text:style-name="P210">Recommended MVP</text:p>
      <text:p text:style-name="Normal">Use this flow:</text:p>
      <text:p text:style-name="Normal">OCR / Document parser extracts raw text<text:line-break/><text:s text:c="8"/>↓<text:line-break/>OpenAI validates and converts result to clean JSON<text:line-break/><text:s text:c="8"/>↓<text:line-break/>Backend saves JSON into database/Excel</text:p>
      <text:p text:style-name="Normal"><draw:custom-shape svg:x="0in" svg:y="0in" svg:width="45.51042in" svg:height="0.00139in" draw:z-index="0" draw:id="id18" draw:style-name="a18" draw:name="Horizontal Line 199" text:anchor-type="as-char"><svg:title/><svg:desc/><draw:enhanced-geometry draw:type="non-primitive" svg:viewBox="0 0 21600 21600" draw:enhanced-path="M 0 0 L 21600 0 21600 21600 0 21600 Z N"/></draw:custom-shape></text:p>
      <text:p text:style-name="P211">11. Backend API Requirements</text:p>
      <text:p text:style-name="P212">Invoice APIs</text:p>
      <text:p text:style-name="Normal">POST /api/invoices/upload<text:line-break/>GET /api/invoices<text:line-break/>GET /api/invoices/{id}<text:line-break/>PUT /api/invoices/{id}<text:line-break/>DELETE /api/invoices/{id}<text:line-break/>POST /api/invoices/{id}/approve</text:p>
      <text:soft-page-break/>
      <text:p text:style-name="P213">Bank Statement APIs</text:p>
      <text:p text:style-name="Normal">POST /api/bank-statements/upload<text:line-break/>GET /api/bank-statements<text:line-break/>GET /api/bank-transactions</text:p>
      <text:p text:style-name="P214">Matching APIs</text:p>
      <text:p text:style-name="Normal">POST /api/reconciliation/run<text:line-break/>GET /api/reconciliation/results<text:line-break/>POST /api/reconciliation/approve-match<text:line-break/>POST /api/reconciliation/reject-match</text:p>
      <text:p text:style-name="P215">Export APIs</text:p>
      <text:p text:style-name="Normal">GET /api/export/purchase-invoices-excel<text:line-break/>GET /api/export/monthly-report</text:p>
      <text:p text:style-name="Normal"><draw:custom-shape svg:x="0in" svg:y="0in" svg:width="45.51042in" svg:height="0.00139in" draw:z-index="0" draw:id="id19" draw:style-name="a19" draw:name="Horizontal Line 200" text:anchor-type="as-char"><svg:title/><svg:desc/><draw:enhanced-geometry draw:type="non-primitive" svg:viewBox="0 0 21600 21600" draw:enhanced-path="M 0 0 L 21600 0 21600 21600 0 21600 Z N"/></draw:custom-shape></text:p>
      <text:p text:style-name="P216">12. Data Models</text:p>
      <text:p text:style-name="P217">Invoice Model</text:p>
      <text:p text:style-name="Normal">{<text:line-break/><text:s text:c="2"/>"id": 1,<text:line-break/><text:s text:c="2"/>"invoice_date": "2026-05-15",<text:line-break/><text:s text:c="2"/>"name_of_company": "ADIA Group",<text:line-break/><text:s text:c="2"/>"address_of_company": "Prishtina, Kosovo",<text:line-break/><text:s text:c="2"/>"invoice_number": "26063",<text:line-break/><text:s text:c="2"/>"amount": 220.66,<text:line-break/><text:s text:c="2"/>"currency": "EUR",<text:line-break/><text:s text:c="2"/>"account_details": "IBAN...",<text:line-break/><text:s text:c="2"/>"internal_note_description": "Water supply invoice",<text:line-break/><text:s text:c="2"/>"client_employee_related": "",<text:line-break/><text:s text:c="2"/>"paid_at_date": null,<text:line-break/><text:s text:c="2"/>"paid_by": null,<text:line-break/><text:s text:c="2"/>"fixed_status": "",<text:line-break/><text:s text:c="2"/>"category": "Utilities",<text:line-break/><text:s text:c="2"/>"extraction_confidence": 0.94,<text:line-break/><text:s text:c="2"/>"review_status": "Approved",<text:line-break/><text:s text:c="2"/>"source_file": "adia_invoice.pdf"<text:line-break/>}</text:p>
      <text:soft-page-break/>
      <text:p text:style-name="P218">Bank Transaction Model</text:p>
      <text:p text:style-name="Normal">{<text:line-break/><text:s text:c="2"/>"id": 1,<text:line-break/><text:s text:c="2"/>"transaction_date": "2026-02-25",<text:line-break/><text:s text:c="2"/>"debited_amount": 772.39,<text:line-break/><text:s text:c="2"/>"credited_amount": null,<text:line-break/><text:s text:c="2"/>"transaction_type": "Transfer",<text:line-break/><text:s text:c="2"/>"comment": "Payment for invoices 26063, 26060, 260658",<text:line-break/><text:s text:c="2"/>"detected_invoice_numbers": ["26063", "26060", "260658"]<text:line-break/>}</text:p>
      <text:p text:style-name="P219">Match Result Model</text:p>
      <text:p text:style-name="Normal">{<text:line-break/><text:s text:c="2"/>"id": 1,<text:line-break/><text:s text:c="2"/>"invoice_id": 10,<text:line-break/><text:s text:c="2"/>"bank_transaction_id": 5,<text:line-break/><text:s text:c="2"/>"invoice_number": "26063",<text:line-break/><text:s text:c="2"/>"match_type": "invoice_number",<text:line-break/><text:s text:c="2"/>"match_confidence": 0.98,<text:line-break/><text:s text:c="2"/>"status": "Matched",<text:line-break/><text:s text:c="2"/>"paid_at_date": "2026-02-25"<text:line-break/>}</text:p>
      <text:p text:style-name="Normal"><draw:custom-shape svg:x="0in" svg:y="0in" svg:width="45.51042in" svg:height="0.00139in" draw:z-index="0" draw:id="id20" draw:style-name="a20" draw:name="Horizontal Line 201" text:anchor-type="as-char"><svg:title/><svg:desc/><draw:enhanced-geometry draw:type="non-primitive" svg:viewBox="0 0 21600 21600" draw:enhanced-path="M 0 0 L 21600 0 21600 21600 0 21600 Z N"/></draw:custom-shape></text:p>
      <text:p text:style-name="P220">13. Frontend Requirements</text:p>
      <text:p text:style-name="P221">Upload Invoices Page</text:p>
      <text:p text:style-name="Normal">Must include:</text:p>
      <text:p text:style-name="Normal">Drag-and-drop upload<text:line-break/>Multiple file upload<text:line-break/>File status<text:line-break/>AI extraction status<text:line-break/>Error message if extraction fails<text:line-break/>Review button</text:p>
      <text:p text:style-name="P222">Purchase Invoices Table</text:p>
      <text:p text:style-name="Normal">Must show:</text:p>
      <text:soft-page-break/>
      <text:p text:style-name="Normal">Invoice Date<text:line-break/>Name of Company<text:line-break/>Address<text:line-break/>Invoice Number<text:line-break/>Amount<text:line-break/>Account Details<text:line-break/>Description<text:line-break/>Client / Employee Related<text:line-break/>paid at (Date)<text:line-break/>paid by<text:line-break/>Fixed/Not fixed<text:line-break/>Category<text:line-break/>Review Status<text:line-break/>Match Status</text:p>
      <text:p text:style-name="Normal">The user should be able to edit fields manually.</text:p>
      <text:p text:style-name="Normal"><draw:custom-shape svg:x="0in" svg:y="0in" svg:width="45.51042in" svg:height="0.00139in" draw:z-index="0" draw:id="id21" draw:style-name="a21" draw:name="Horizontal Line 202" text:anchor-type="as-char"><svg:title/><svg:desc/><draw:enhanced-geometry draw:type="non-primitive" svg:viewBox="0 0 21600 21600" draw:enhanced-path="M 0 0 L 21600 0 21600 21600 0 21600 Z N"/></draw:custom-shape></text:p>
      <text:p text:style-name="P223">Bank Statement Upload Page</text:p>
      <text:p text:style-name="Normal">Must include:</text:p>
      <text:p text:style-name="Normal">Upload Excel file<text:line-break/>Preview extracted rows<text:line-break/>Show detected invoice numbers from Comment column<text:line-break/>Show processing status</text:p>
      <text:p text:style-name="Normal"><draw:custom-shape svg:x="0in" svg:y="0in" svg:width="45.51042in" svg:height="0.00139in" draw:z-index="0" draw:id="id22" draw:style-name="a22" draw:name="Horizontal Line 203" text:anchor-type="as-char"><svg:title/><svg:desc/><draw:enhanced-geometry draw:type="non-primitive" svg:viewBox="0 0 21600 21600" draw:enhanced-path="M 0 0 L 21600 0 21600 21600 0 21600 Z N"/></draw:custom-shape></text:p>
      <text:p text:style-name="P224">Matching Results Page</text:p>
      <text:p text:style-name="Normal">Must show:</text:p>
      <text:p text:style-name="Normal">Matched invoices<text:line-break/>Unmatched invoices<text:line-break/>Unmatched bank transactions<text:line-break/>Needs Review cases<text:line-break/>Batch payment candidates</text:p>
      <text:p text:style-name="Normal"><draw:custom-shape svg:x="0in" svg:y="0in" svg:width="45.51042in" svg:height="0.00139in" draw:z-index="0" draw:id="id23" draw:style-name="a23" draw:name="Horizontal Line 204" text:anchor-type="as-char"><svg:title/><svg:desc/><draw:enhanced-geometry draw:type="non-primitive" svg:viewBox="0 0 21600 21600" draw:enhanced-path="M 0 0 L 21600 0 21600 21600 0 21600 Z N"/></draw:custom-shape></text:p>
      <text:p text:style-name="P225">14. Manual Review Queue</text:p>
      <text:soft-page-break/>
      <text:p text:style-name="Normal">The review queue is important.</text:p>
      <text:p text:style-name="Normal">Each review item should show:</text:p>
      <text:p text:style-name="Normal">Original invoice file preview<text:line-break/>AI extracted data<text:line-break/>Editable fields<text:line-break/>Bank transaction candidate<text:line-break/>Reason for review<text:line-break/>Approve button<text:line-break/>Reject button<text:line-break/>Save correction button</text:p>
      <text:p text:style-name="Normal">Review reasons:</text:p>
      <text:p text:style-name="Normal">Missing invoice number<text:line-break/>Low AI confidence<text:line-break/>No bank statement match<text:line-break/>Multiple possible matches<text:line-break/>Amount mismatch<text:line-break/>Unclear scanned invoice</text:p>
      <text:p text:style-name="Normal"><draw:custom-shape svg:x="0in" svg:y="0in" svg:width="45.51042in" svg:height="0.00139in" draw:z-index="0" draw:id="id24" draw:style-name="a24" draw:name="Horizontal Line 205" text:anchor-type="as-char"><svg:title/><svg:desc/><draw:enhanced-geometry draw:type="non-primitive" svg:viewBox="0 0 21600 21600" draw:enhanced-path="M 0 0 L 21600 0 21600 21600 0 21600 Z N"/></draw:custom-shape></text:p>
      <text:p text:style-name="P226">15. Export Requirements</text:p>
      <text:p text:style-name="Normal">The system must export the updated Purchase Invoices Database back to Excel.</text:p>
      <text:p text:style-name="Normal">The exported Excel must keep the same column structure:</text:p>
      <text:p text:style-name="Normal">Invoice Date<text:line-break/>Name of Company<text:line-break/>Adress of Company<text:line-break/>Invoice Number<text:line-break/>Amount<text:line-break/>Account Details<text:line-break/>Internal Note/Description<text:line-break/>Client / Employee Related<text:line-break/>paid at (Date)<text:line-break/>paid by<text:line-break/>Fixed/Not fixed<text:line-break/>Category</text:p>
      <text:soft-page-break/>
      <text:p text:style-name="Normal">Optional additional columns for internal system use:</text:p>
      <text:p text:style-name="Normal">AI Confidence<text:line-break/>Match Status<text:line-break/>Review Status<text:line-break/>Source File</text:p>
      <text:p text:style-name="Normal">But for Finance’s official file, keep the original columns unless they approve extra columns.</text:p>
      <text:p text:style-name="Normal"><draw:custom-shape svg:x="0in" svg:y="0in" svg:width="45.51042in" svg:height="0.00139in" draw:z-index="0" draw:id="id25" draw:style-name="a25" draw:name="Horizontal Line 206" text:anchor-type="as-char"><svg:title/><svg:desc/><draw:enhanced-geometry draw:type="non-primitive" svg:viewBox="0 0 21600 21600" draw:enhanced-path="M 0 0 L 21600 0 21600 21600 0 21600 Z N"/></draw:custom-shape></text:p>
      <text:p text:style-name="P227">16. Security Requirements</text:p>
      <text:p text:style-name="Normal">Because this system processes financial data, interns must follow these rules:</text:p>
      <text:p text:style-name="Normal">Do not connect directly to bank accounts.<text:line-break/>Use only uploaded bank statement files.<text:line-break/>Do not expose uploaded invoices publicly.<text:line-break/>Store files securely.<text:line-break/>Add authentication.<text:line-break/>Add role-based access.<text:line-break/>Log all edits.<text:line-break/>Log all AI extractions.<text:line-break/>Log all payment date updates.<text:line-break/>Keep original files for audit.<text:line-break/>Allow manual correction.</text:p>
      <text:p text:style-name="Normal"><draw:custom-shape svg:x="0in" svg:y="0in" svg:width="45.51042in" svg:height="0.00139in" draw:z-index="0" draw:id="id26" draw:style-name="a26" draw:name="Horizontal Line 207" text:anchor-type="as-char"><svg:title/><svg:desc/><draw:enhanced-geometry draw:type="non-primitive" svg:viewBox="0 0 21600 21600" draw:enhanced-path="M 0 0 L 21600 0 21600 21600 0 21600 Z N"/></draw:custom-shape></text:p>
      <text:p text:style-name="P228">17. MVP Implementation Phases</text:p>
      <text:p text:style-name="P229">Phase 1: Basic Invoice Extraction</text:p>
      <text:p text:style-name="Normal">Deliverables:</text:p>
      <text:p text:style-name="Normal">Upload invoice files<text:line-break/>Extract invoice fields with AI<text:line-break/>Save extracted data<text:line-break/>Display invoice table<text:line-break/>Export Purchase Invoices Excel</text:p>
      <text:p text:style-name="P230">Phase 2: Bank Statement Reader</text:p>
      <text:p text:style-name="Normal">Deliverables:</text:p>
      <text:soft-page-break/>
      <text:p text:style-name="Normal">Upload bank statement Excel<text:line-break/>Read transaction rows<text:line-break/>Extract Date, Amount, Comment<text:line-break/>Detect invoice numbers from Comment<text:line-break/>Display bank transaction table</text:p>
      <text:p text:style-name="P231">Phase 3: Invoice Matching</text:p>
      <text:p text:style-name="Normal">Deliverables:</text:p>
      <text:p text:style-name="Normal">Match detected invoice numbers with Purchase Invoices Database<text:line-break/>Fill paid at (Date)<text:line-break/>Leave paid by manual<text:line-break/>Show matched and unmatched rows<text:line-break/>Create review queue</text:p>
      <text:p text:style-name="P232">Phase 4: Manual Review and Approval</text:p>
      <text:p text:style-name="Normal">Deliverables:</text:p>
      <text:p text:style-name="Normal">Review uncertain AI extractions<text:line-break/>Edit extracted invoice data<text:line-break/>Approve or reject matches<text:line-break/>Track review status</text:p>
      <text:p text:style-name="P233">Phase 5: Reports</text:p>
      <text:p text:style-name="Normal">Deliverables:</text:p>
      <text:p text:style-name="Normal">Monthly invoice total<text:line-break/>Paid/unpaid invoices<text:line-break/>Unmatched invoices<text:line-break/>Category breakdown<text:line-break/>Export report</text:p>
      <text:p text:style-name="Normal"><draw:custom-shape svg:x="0in" svg:y="0in" svg:width="45.51042in" svg:height="0.00139in" draw:z-index="0" draw:id="id27" draw:style-name="a27" draw:name="Horizontal Line 208" text:anchor-type="as-char"><svg:title/><svg:desc/><draw:enhanced-geometry draw:type="non-primitive" svg:viewBox="0 0 21600 21600" draw:enhanced-path="M 0 0 L 21600 0 21600 21600 0 21600 Z N"/></draw:custom-shape></text:p>
      <text:p text:style-name="P234">18. Intern Task Breakdown</text:p>
      <text:p text:style-name="P235">Intern 1: Backend + Excel Processing</text:p>
      <text:p text:style-name="Normal">Responsibilities:</text:p>
      <text:p text:style-name="Normal">FastAPI setup<text:line-break/>Invoice upload endpoint<text:line-break/><text:soft-page-break/>Bank statement upload endpoint<text:line-break/>Excel reading/writing<text:line-break/>Database models<text:line-break/>Export to Excel</text:p>
      <text:p text:style-name="P236">Intern 2: AI Extraction</text:p>
      <text:p text:style-name="Normal">Responsibilities:</text:p>
      <text:p text:style-name="Normal">Invoice OCR/AI extraction<text:line-break/>Prompt design for JSON output<text:line-break/>Confidence scoring<text:line-break/>Invoice field validation<text:line-break/>Handling photos and scanned PDFs</text:p>
      <text:p text:style-name="P237">Intern 3: Matching Logic + Frontend</text:p>
      <text:p text:style-name="Normal">Responsibilities:</text:p>
      <text:p text:style-name="Normal">Invoice number parser<text:line-break/>Bank comment parser<text:line-break/>Matching algorithm<text:line-break/>React upload pages<text:line-break/>Invoice table<text:line-break/>Review queue UI</text:p>
      <text:p text:style-name="Normal">If there are only two interns:</text:p>
      <text:p text:style-name="Normal">Intern 1: Backend, database, Excel, matching<text:line-break/>Intern 2: AI extraction, frontend, review UI</text:p>
      <text:p text:style-name="Normal"><draw:custom-shape svg:x="0in" svg:y="0in" svg:width="45.51042in" svg:height="0.00139in" draw:z-index="0" draw:id="id28" draw:style-name="a28" draw:name="Horizontal Line 209" text:anchor-type="as-char"><svg:title/><svg:desc/><draw:enhanced-geometry draw:type="non-primitive" svg:viewBox="0 0 21600 21600" draw:enhanced-path="M 0 0 L 21600 0 21600 21600 0 21600 Z N"/></draw:custom-shape></text:p>
      <text:p text:style-name="P238">19. Definition of Done for MVP</text:p>
      <text:p text:style-name="Normal">The MVP is done when:</text:p>
      <text:p text:style-name="Normal">Finance can upload invoice files.<text:line-break/>AI extracts invoice data.<text:line-break/>Data appears in the Purchase Invoices Database table.<text:line-break/>Finance can upload Bank Statement Excel.<text:line-break/>System reads the Comment column.<text:line-break/>System detects invoice numbers from comments.<text:line-break/>System matches invoice numbers with Purchase Invoices Database.<text:line-break/><text:soft-page-break/>System fills paid at (Date) automatically.<text:line-break/>paid by remains manual.<text:line-break/>Unmatched cases are shown in Needs Review.<text:line-break/>Finance can export the updated Purchase Invoices Excel.</text:p>
      <text:p text:style-name="Normal"><draw:custom-shape svg:x="0in" svg:y="0in" svg:width="45.51042in" svg:height="0.00139in" draw:z-index="0" draw:id="id29" draw:style-name="a29" draw:name="Horizontal Line 210" text:anchor-type="as-char"><svg:title/><svg:desc/><draw:enhanced-geometry draw:type="non-primitive" svg:viewBox="0 0 21600 21600" draw:enhanced-path="M 0 0 L 21600 0 21600 21600 0 21600 Z N"/></draw:custom-shape></text:p>
      <text:p text:style-name="P239">20. Important Rule for Interns</text:p>
      <text:p text:style-name="Normal">The system should follow this principle:</text:p>
      <text:p text:style-name="Normal">AI can extract and suggest.<text:line-break/>The system can auto-fill when there is a clear match.<text:line-break/>Finance must review unclear cases.<text:line-break/>Never guess financial data when confidence is low.</text:p>
      <text:p text:style-name="Normal">The most important matching rule is:</text:p>
      <text:p text:style-name="Normal">Bank Statement Komenti / Comment contains invoice number<text:line-break/><text:s text:c="8"/>↓<text:line-break/>Find same invoice number in Purchase Invoices Database<text:line-break/><text:s text:c="8"/>↓<text:line-break/>Copy Bank Statement Data / Date<text:line-break/><text:s text:c="8"/>↓<text:line-break/>Paste into Purchase Invoices paid at (Date)</text:p>
      <text:p text:style-name="Normal">This is the core logic of the projec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ida Abazi</meta:initial-creator>
    <dc:creator>Laida Abazi</dc:creator>
    <meta:creation-date>2026-05-19T18:20:00Z</meta:creation-date>
    <dc:date>2026-05-19T18:20:00Z</dc:date>
    <meta:template xlink:href="Normal" xlink:type="simple"/>
    <meta:editing-cycles>1</meta:editing-cycles>
    <meta:editing-duration>PT0S</meta:editing-duration>
    <meta:document-statistic meta:page-count="21" meta:paragraph-count="34" meta:word-count="2570" meta:character-count="17190" meta:row-count="122" meta:non-whitespace-character-count="14654"/>
  </office:meta>
</office:document-meta>
</file>